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4cae"/>
    </style:style>
    <style:style style:name="P2" style:family="paragraph" style:parent-style-name="Standard">
      <style:text-properties officeooo:paragraph-rsid="001b8a43"/>
    </style:style>
    <style:style style:name="P3" style:family="paragraph" style:parent-style-name="Standard">
      <style:text-properties officeooo:paragraph-rsid="001d366b"/>
    </style:style>
    <style:style style:name="P4" style:family="paragraph" style:parent-style-name="Standard">
      <style:text-properties officeooo:paragraph-rsid="001e458c"/>
    </style:style>
    <style:style style:name="P5" style:family="paragraph" style:parent-style-name="Standard">
      <style:text-properties officeooo:paragraph-rsid="002104a1"/>
    </style:style>
    <style:style style:name="P6" style:family="paragraph" style:parent-style-name="Standard">
      <style:text-properties officeooo:paragraph-rsid="0022079b"/>
    </style:style>
    <style:style style:name="P7" style:family="paragraph" style:parent-style-name="Standard">
      <style:text-properties officeooo:paragraph-rsid="0027f498"/>
    </style:style>
    <style:style style:name="T1" style:family="text">
      <style:text-properties officeooo:rsid="00194cae"/>
    </style:style>
    <style:style style:name="T2" style:family="text">
      <style:text-properties officeooo:rsid="0019fe77"/>
    </style:style>
    <style:style style:name="T3" style:family="text">
      <style:text-properties officeooo:rsid="001c8b49"/>
    </style:style>
    <style:style style:name="T4" style:family="text">
      <style:text-properties officeooo:rsid="001e458c"/>
    </style:style>
    <style:style style:name="T5" style:family="text">
      <style:text-properties officeooo:rsid="001e775b"/>
    </style:style>
    <style:style style:name="T6" style:family="text">
      <style:text-properties officeooo:rsid="002104a1"/>
    </style:style>
    <style:style style:name="T7" style:family="text">
      <style:text-properties officeooo:rsid="0024e1a7"/>
    </style:style>
    <style:style style:name="T8" style:family="text">
      <style:text-properties officeooo:rsid="0025a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vis_auc_all_skebke.py <text:s/><text:span text:style-name="T1">Page </text:span><text:span text:style-name="T6">6</text:span><text:span text:style-name="T1"> figure in ppt</text:span></text:p>
      <text:p text:style-name="P6">vis_auc_all_skebkslumpy.<text:span text:style-name="T8">py</text:span> <text:s/><text:span text:style-name="T1">Page </text:span><text:span text:style-name="T7">7</text:span><text:span text:style-name="T1"> figure in ppt</text:span></text:p>
      <text:p text:style-name="P7"/>
      <text:p text:style-name="P6"/>
      <text:p text:style-name="Standard">vis_auc_MRI_all.py: <text:span text:style-name="T1">Page 8 figure in ppt</text:span></text:p>
      <text:p text:style-name="P1">vis_auc_MRI_all_sks.py <text:s/><text:span text:style-name="T1">Page 10 figure in ppt</text:span></text:p>
      <text:p text:style-name="P1"/>
      <text:p text:style-name="P2">vis_kl_z_mri_new1.py <text:s/><text:span text:style-name="T1">Page </text:span><text:span text:style-name="T3">9</text:span><text:span text:style-name="T1"> <text:s/></text:span><text:span text:style-name="T3">left </text:span><text:span text:style-name="T1">figure in ppt</text:span></text:p>
      <text:p text:style-name="P2">vis_kl_z_mri_new<text:span text:style-name="T2">05</text:span>.py <text:span text:style-name="T1">Page </text:span><text:span text:style-name="T3">9</text:span><text:span text:style-name="T1"> </text:span><text:span text:style-name="T3">midlle </text:span><text:span text:style-name="T1">figure in ppt</text:span></text:p>
      <text:p text:style-name="P2">vis_kl_z_mri_new<text:span text:style-name="T2">005</text:span>.py <text:span text:style-name="T1">Page </text:span><text:span text:style-name="T3">9</text:span><text:span text:style-name="T1"> </text:span><text:span text:style-name="T3">right </text:span><text:span text:style-name="T1">figure in ppt</text:span></text:p>
      <text:p text:style-name="P2"/>
      <text:p text:style-name="P2"/>
      <text:p text:style-name="P3">vis_kl_z_mri_new1_<text:span text:style-name="T4">sks</text:span>.py <text:s/><text:span text:style-name="T1">Page </text:span><text:span text:style-name="T5">11</text:span><text:span text:style-name="T1"> <text:s/></text:span><text:span text:style-name="T3">left </text:span><text:span text:style-name="T1">figure in ppt</text:span></text:p>
      <text:p text:style-name="P4">vis_kl_z_mri_new<text:span text:style-name="T2">05_</text:span><text:span text:style-name="T4">sks</text:span>.py <text:span text:style-name="T1">Page </text:span><text:span text:style-name="T5">11</text:span><text:span text:style-name="T1"> </text:span><text:span text:style-name="T3">midlle </text:span><text:span text:style-name="T1">figure in ppt</text:span></text:p>
      <text:p text:style-name="P4">vis_kl_z_mri_new<text:span text:style-name="T2">005_</text:span><text:span text:style-name="T4">sks</text:span>.py <text:span text:style-name="T1">Page </text:span><text:span text:style-name="T5">11</text:span><text:span text:style-name="T1"> </text:span><text:span text:style-name="T3">right </text:span><text:span text:style-name="T1">figure in pp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2:58:30.825420093</meta:creation-date>
    <dc:date>2026-01-14T13:38:09.680616455</dc:date>
    <meta:editing-duration>PT25M45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6" meta:character-count="483" meta:non-whitespace-character-count="420"/>
  </office:meta>
</office:document-meta>
</file>